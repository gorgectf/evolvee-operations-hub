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49cm" fo:min-width="0.44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solid" svg:stroke-width="0.026cm" svg:stroke-color="#dddddd" draw:stroke-linejoin="miter" svg:stroke-linecap="butt" draw:fill="none" fo:padding-top="0.013cm" fo:padding-bottom="0.013cm" fo:padding-left="0.013cm" fo:padding-right="0.013cm" loext:decorative="false"/>
    </style:style>
    <style:style style:name="gr4" style:family="graphic" style:parent-style-name="standard">
      <style:graphic-properties draw:stroke="solid" svg:stroke-width="0.026cm" svg:stroke-color="#dddddd" draw:stroke-linejoin="miter" svg:stroke-linecap="butt" draw:fill="solid" draw:fill-color="#f9f9f9" fo:padding-top="0.013cm" fo:padding-bottom="0.013cm" fo:padding-left="0.013cm" fo:padding-right="0.013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9cm" fo:min-width="0.2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4472c4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77cm" fo:min-width="0.27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2e9e8f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d4a017" loext:decorative="false"/>
    </style:style>
    <style:style style:name="gr11" style:family="graphic" style:parent-style-name="standard">
      <style:graphic-properties draw:stroke="dash" draw:stroke-dash="stroke-dash50" svg:stroke-width="0.026cm" svg:stroke-color="#aaaaaa" draw:stroke-linejoin="miter" svg:stroke-linecap="butt" draw:fill="solid" draw:fill-color="#ffffff" fo:padding-top="0.013cm" fo:padding-bottom="0.013cm" fo:padding-left="0.013cm" fo:padding-right="0.013cm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5cm" fo:min-width="0.2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solid" svg:stroke-width="0.026cm" svg:stroke-color="#2a52a0" draw:stroke-linejoin="miter" svg:stroke-linecap="butt" draw:fill="solid" draw:fill-color="#4472c4" fo:padding-top="0.013cm" fo:padding-bottom="0.013cm" fo:padding-left="0.013cm" fo:padding-right="0.013cm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6cm" fo:min-width="0.356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47cm" svg:stroke-color="#4472c4" draw:stroke-linejoin="miter" svg:stroke-linecap="butt" draw:fill="none" fo:padding-top="0.023cm" fo:padding-bottom="0.023cm" fo:padding-left="0.023cm" fo:padding-right="0.023cm" loext:decorative="false"/>
    </style:style>
    <style:style style:name="gr16" style:family="graphic" style:parent-style-name="standard">
      <style:graphic-properties draw:stroke="solid" svg:stroke-width="0.042cm" svg:stroke-color="#4472c4" draw:stroke-linejoin="round" svg:stroke-linecap="round" draw:fill="none" fo:padding-top="0.021cm" fo:padding-bottom="0.021cm" fo:padding-left="0.021cm" fo:padding-right="0.021cm" loext:decorative="false"/>
    </style:style>
    <style:style style:name="gr17" style:family="graphic" style:parent-style-name="standard">
      <style:graphic-properties draw:stroke="none" draw:fill="solid" draw:fill-color="#eef2ff" loext:decorative="false"/>
    </style:style>
    <style:style style:name="gr18" style:family="graphic" style:parent-style-name="standard">
      <style:graphic-properties draw:stroke="solid" svg:stroke-width="0.026cm" svg:stroke-color="#1f7068" draw:stroke-linejoin="miter" svg:stroke-linecap="butt" draw:fill="solid" draw:fill-color="#2e9e8f" fo:padding-top="0.013cm" fo:padding-bottom="0.013cm" fo:padding-left="0.013cm" fo:padding-right="0.013cm" loext:decorative="fals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.3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dash" draw:stroke-dash="stroke-dash61" svg:stroke-width="0.037cm" svg:stroke-color="#2e9e8f" draw:stroke-linejoin="miter" svg:stroke-linecap="butt" draw:fill="none" fo:padding-top="0.018cm" fo:padding-bottom="0.018cm" fo:padding-left="0.018cm" fo:padding-right="0.018cm" loext:decorative="false"/>
    </style:style>
    <style:style style:name="gr21" style:family="graphic" style:parent-style-name="standard">
      <style:graphic-properties draw:stroke="dash" draw:stroke-dash="stroke-dash76" svg:stroke-width="0.033cm" svg:stroke-color="#2e9e8f" draw:stroke-linejoin="round" svg:stroke-linecap="round" draw:fill="none" fo:padding-top="0.016cm" fo:padding-bottom="0.016cm" fo:padding-left="0.016cm" fo:padding-right="0.016cm" loext:decorative="fals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37cm" fo:min-width="0.23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solid" svg:stroke-width="0.037cm" svg:stroke-color="#2e9e8f" draw:stroke-linejoin="miter" svg:stroke-linecap="butt" draw:fill="none" fo:padding-top="0.018cm" fo:padding-bottom="0.018cm" fo:padding-left="0.018cm" fo:padding-right="0.018cm" loext:decorative="false"/>
    </style:style>
    <style:style style:name="gr24" style:family="graphic" style:parent-style-name="standard">
      <style:graphic-properties draw:stroke="solid" svg:stroke-width="0.033cm" svg:stroke-color="#2e9e8f" draw:stroke-linejoin="round" svg:stroke-linecap="round" draw:fill="none" fo:padding-top="0.016cm" fo:padding-bottom="0.016cm" fo:padding-left="0.016cm" fo:padding-right="0.016cm" loext:decorative="false"/>
    </style:style>
    <style:style style:name="gr25" style:family="graphic" style:parent-style-name="standard">
      <style:graphic-properties draw:stroke="solid" svg:stroke-width="0.031cm" svg:stroke-color="#d4a017" draw:stroke-linejoin="miter" svg:stroke-linecap="butt" draw:fill="solid" draw:fill-color="#fffbee" fo:padding-top="0.015cm" fo:padding-bottom="0.015cm" fo:padding-left="0.015cm" fo:padding-right="0.015cm" loext:decorative="false"/>
    </style:style>
    <style:style style:name="gr26" style:family="graphic" style:parent-style-name="standard">
      <style:graphic-properties draw:stroke="solid" svg:stroke-width="0.026cm" svg:stroke-color="#a07010" draw:stroke-linejoin="miter" svg:stroke-linecap="butt" draw:fill="solid" draw:fill-color="#d4a017" fo:padding-top="0.013cm" fo:padding-bottom="0.013cm" fo:padding-left="0.013cm" fo:padding-right="0.013cm" loext:decorative="false"/>
    </style:style>
    <style:style style:name="gr27" style:family="graphic" style:parent-style-name="standard">
      <style:graphic-properties draw:stroke="solid" svg:stroke-width="0.037cm" svg:stroke-color="#d4a017" draw:stroke-linejoin="miter" svg:stroke-linecap="butt" draw:fill="none" fo:padding-top="0.018cm" fo:padding-bottom="0.018cm" fo:padding-left="0.018cm" fo:padding-right="0.018cm" loext:decorative="false"/>
    </style:style>
    <style:style style:name="gr28" style:family="graphic" style:parent-style-name="standard">
      <style:graphic-properties draw:stroke="solid" svg:stroke-width="0.033cm" svg:stroke-color="#d4a017" draw:stroke-linejoin="round" svg:stroke-linecap="round" draw:fill="none" fo:padding-top="0.016cm" fo:padding-bottom="0.016cm" fo:padding-left="0.016cm" fo:padding-right="0.016cm" loext:decorative="false"/>
    </style:style>
    <style:style style:name="gr29" style:family="graphic" style:parent-style-name="standard">
      <style:graphic-properties draw:stroke="dash" draw:stroke-dash="stroke-dash83" svg:stroke-width="0.031cm" svg:stroke-color="#d4a017" draw:stroke-linejoin="miter" svg:stroke-linecap="butt" draw:fill="none" fo:padding-top="0.015cm" fo:padding-bottom="0.015cm" fo:padding-left="0.015cm" fo:padding-right="0.015cm" loext:decorative="false"/>
    </style:style>
    <style:style style:name="gr30" style:family="graphic" style:parent-style-name="standard">
      <style:graphic-properties draw:stroke="dash" draw:stroke-dash="stroke-dash88" svg:stroke-width="0.028cm" svg:stroke-color="#d4a017" draw:stroke-linejoin="round" svg:stroke-linecap="round" draw:fill="none" fo:padding-top="0.014cm" fo:padding-bottom="0.014cm" fo:padding-left="0.014cm" fo:padding-right="0.014cm" loext:decorative="false"/>
    </style:style>
    <style:style style:name="gr31" style:family="graphic" style:parent-style-name="standard">
      <style:graphic-properties draw:stroke="dash" draw:stroke-dash="stroke-dash103" svg:stroke-width="0.037cm" svg:stroke-color="#aaaaaa" draw:stroke-linejoin="miter" svg:stroke-linecap="butt" draw:fill="solid" draw:fill-color="#fafafa" fo:padding-top="0.018cm" fo:padding-bottom="0.018cm" fo:padding-left="0.018cm" fo:padding-right="0.018cm" loext:decorative="false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solid" svg:stroke-width="0.026cm" svg:stroke-color="#eeeeee" draw:stroke-linejoin="miter" svg:stroke-linecap="butt" draw:fill="none" fo:padding-top="0.013cm" fo:padding-bottom="0.013cm" fo:padding-left="0.013cm" fo:padding-right="0.013cm" loext:decorative="fals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.8000001907349pt" style:font-size-asian="12.8000001907349pt" style:font-size-complex="12.8000001907349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9f9f9"/>
    </style:style>
    <style:style style:name="P6" style:family="paragraph">
      <loext:graphic-properties draw:fill="none"/>
      <style:text-properties fo:font-size="8.19999980926514pt" style:font-size-asian="8.19999980926514pt" style:font-size-complex="8.19999980926514pt"/>
    </style:style>
    <style:style style:name="P7" style:family="paragraph">
      <loext:graphic-properties draw:fill="solid" draw:fill-color="#4472c4"/>
    </style:style>
    <style:style style:name="P8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9" style:family="paragraph">
      <loext:graphic-properties draw:fill="solid" draw:fill-color="#2e9e8f"/>
    </style:style>
    <style:style style:name="P10" style:family="paragraph">
      <loext:graphic-properties draw:fill="none"/>
      <style:text-properties fo:font-size="7.5pt" style:font-size-asian="7.5pt" style:font-size-complex="7.5pt"/>
    </style:style>
    <style:style style:name="P11" style:family="paragraph">
      <loext:graphic-properties draw:fill="solid" draw:fill-color="#d4a017"/>
    </style:style>
    <style:style style:name="P12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1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14" style:family="paragraph">
      <loext:graphic-properties draw:fill="solid" draw:fill-color="#eef2ff"/>
    </style:style>
    <style:style style:name="P15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16" style:family="paragraph">
      <loext:graphic-properties draw:fill="none"/>
      <style:text-properties fo:font-size="6.69999980926514pt" style:font-size-asian="6.69999980926514pt" style:font-size-complex="6.69999980926514pt"/>
    </style:style>
    <style:style style:name="P17" style:family="paragraph">
      <loext:graphic-properties draw:fill="solid" draw:fill-color="#fffbee"/>
    </style:style>
    <style:style style:name="P18" style:family="paragraph">
      <loext:graphic-properties draw:fill="solid" draw:fill-color="#fafafa"/>
    </style:style>
    <style:style style:name="P19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1e1e1e" loext:opacity="100%" style:font-name="DejaVuSans" fo:font-size="12.8000001907349pt" fo:font-weight="bold" style:font-name-asian="DejaVuSans" style:font-size-asian="12.8000001907349pt" style:font-weight-asian="bold" style:font-name-complex="DejaVuSans" style:font-size-complex="12.8000001907349pt" style:font-weight-complex="bold"/>
    </style:style>
    <style:style style:name="T2" style:family="text">
      <style:text-properties fo:color="#888888" loext:opacity="100%" style:font-name="DejaVuSans" fo:font-size="8.19999980926514pt" fo:font-weight="normal" style:font-name-asian="DejaVuSans" style:font-size-asian="8.19999980926514pt" style:font-weight-asian="normal" style:font-name-complex="DejaVuSans" style:font-size-complex="8.19999980926514pt" style:font-weight-complex="normal"/>
    </style:style>
    <style:style style:name="T3" style:family="text">
      <style:text-properties fo:color="#555555" loext:opacity="100%" style:font-name="DejaVuSans" fo:font-size="7.90000009536743pt" fo:font-weight="bold" style:font-name-asian="DejaVuSans" style:font-size-asian="7.90000009536743pt" style:font-weight-asian="bold" style:font-name-complex="DejaVuSans" style:font-size-complex="7.90000009536743pt" style:font-weight-complex="bold"/>
    </style:style>
    <style:style style:name="T4" style:family="text">
      <style:text-properties fo:color="#444444" loext:opacity="100%" style:font-name="DejaVuSans" fo:font-size="7.5pt" fo:font-weight="normal" style:font-name-asian="DejaVuSans" style:font-size-asian="7.5pt" style:font-weight-asian="normal" style:font-name-complex="DejaVuSans" style:font-size-complex="7.5pt" style:font-weight-complex="normal"/>
    </style:style>
    <style:style style:name="T5" style:family="text">
      <style:text-properties fo:color="#777777" loext:opacity="100%" style:font-name="DejaVuSans" fo:font-size="7.09999990463257pt" fo:font-weight="normal" style:font-name-asian="DejaVuSans" style:font-size-asian="7.09999990463257pt" style:font-weight-asian="normal" style:font-name-complex="DejaVuSans" style:font-size-complex="7.09999990463257pt" style:font-weight-complex="normal"/>
    </style:style>
    <style:style style:name="T6" style:family="text">
      <style:text-properties fo:color="#ffffff" loext:opacity="100%" style:font-name="DejaVuSans" fo:font-size="10.1000003814697pt" fo:font-weight="bold" style:font-name-asian="DejaVuSans" style:font-size-asian="10.1000003814697pt" style:font-weight-asian="bold" style:font-name-complex="DejaVuSans" style:font-size-complex="10.1000003814697pt" style:font-weight-complex="bold"/>
    </style:style>
    <style:style style:name="T7" style:family="text">
      <style:text-properties fo:color="#ccdaf7" loext:opacity="100%" style:font-name="DejaVuSans" fo:font-size="7.5pt" fo:font-weight="normal" style:font-name-asian="DejaVuSans" style:font-size-asian="7.5pt" style:font-weight-asian="normal" style:font-name-complex="DejaVuSans" style:font-size-complex="7.5pt" style:font-weight-complex="normal"/>
    </style:style>
    <style:style style:name="T8" style:family="text">
      <style:text-properties fo:color="#4472c4" loext:opacity="100%" style:font-name="DejaVuSans" fo:font-size="7.09999990463257pt" fo:font-weight="normal" style:font-name-asian="DejaVuSans" style:font-size-asian="7.09999990463257pt" style:font-weight-asian="normal" style:font-name-complex="DejaVuSans" style:font-size-complex="7.09999990463257pt" style:font-weight-complex="normal"/>
    </style:style>
    <style:style style:name="T9" style:family="text">
      <style:text-properties fo:color="#ffffff" loext:opacity="100%" style:font-name="DejaVuSans" fo:font-size="9.39999961853027pt" fo:font-weight="bold" style:font-name-asian="DejaVuSans" style:font-size-asian="9.39999961853027pt" style:font-weight-asian="bold" style:font-name-complex="DejaVuSans" style:font-size-complex="9.39999961853027pt" style:font-weight-complex="bold"/>
    </style:style>
    <style:style style:name="T10" style:family="text">
      <style:text-properties fo:color="#b2e8e2" loext:opacity="100%" style:font-name="DejaVuSans" fo:font-size="7.09999990463257pt" fo:font-weight="normal" style:font-name-asian="DejaVuSans" style:font-size-asian="7.09999990463257pt" style:font-weight-asian="normal" style:font-name-complex="DejaVuSans" style:font-size-complex="7.09999990463257pt" style:font-weight-complex="normal"/>
    </style:style>
    <style:style style:name="T11" style:family="text">
      <style:text-properties fo:color="#b2e8e2" loext:opacity="100%" style:font-name="DejaVuSans" fo:font-size="6.69999980926514pt" fo:font-weight="normal" style:font-name-asian="DejaVuSans" style:font-size-asian="6.69999980926514pt" style:font-weight-asian="normal" style:font-name-complex="DejaVuSans" style:font-size-complex="6.69999980926514pt" style:font-weight-complex="normal"/>
    </style:style>
    <style:style style:name="T12" style:family="text">
      <style:text-properties fo:color="#a07010" loext:opacity="100%" style:font-name="DejaVuSans" fo:font-size="8.19999980926514pt" fo:font-weight="bold" style:font-name-asian="DejaVuSans" style:font-size-asian="8.19999980926514pt" style:font-weight-asian="bold" style:font-name-complex="DejaVuSans" style:font-size-complex="8.19999980926514pt" style:font-weight-complex="bold"/>
    </style:style>
    <style:style style:name="T13" style:family="text">
      <style:text-properties fo:color="#ffffff" loext:opacity="100%" style:font-name="DejaVuSans" fo:font-size="7.90000009536743pt" fo:font-weight="bold" style:font-name-asian="DejaVuSans" style:font-size-asian="7.90000009536743pt" style:font-weight-asian="bold" style:font-name-complex="DejaVuSans" style:font-size-complex="7.90000009536743pt" style:font-weight-complex="bold"/>
    </style:style>
    <style:style style:name="T14" style:family="text">
      <style:text-properties fo:color="#fff3cc" loext:opacity="100%" style:font-name="DejaVuSans" fo:font-size="6.69999980926514pt" fo:font-weight="normal" style:font-name-asian="DejaVuSans" style:font-size-asian="6.69999980926514pt" style:font-weight-asian="normal" style:font-name-complex="DejaVuSans" style:font-size-complex="6.69999980926514pt" style:font-weight-complex="normal"/>
    </style:style>
    <style:style style:name="T15" style:family="text">
      <style:text-properties fo:color="#888888" loext:opacity="100%" style:font-name="DejaVuSans" fo:font-size="9pt" fo:font-weight="bold" style:font-name-asian="DejaVuSans" style:font-size-asian="9pt" style:font-weight-asian="bold" style:font-name-complex="DejaVuSans" style:font-size-complex="9pt" style:font-weight-complex="bold"/>
    </style:style>
    <style:style style:name="T16" style:family="text">
      <style:text-properties fo:color="#aaaaaa" loext:opacity="100%" style:font-name="DejaVuSans" fo:font-size="7.5pt" fo:font-weight="normal" style:font-name-asian="DejaVuSans" style:font-size-asian="7.5pt" style:font-weight-asian="normal" style:font-name-complex="DejaVuSans" style:font-size-complex="7.5pt" style:font-weight-complex="normal"/>
    </style:style>
    <style:style style:name="T17" style:family="text">
      <style:text-properties fo:color="#aaaaaa" loext:opacity="100%" style:font-name="DejaVuSans" fo:font-size="7.09999990463257pt" fo:font-weight="normal" style:font-name-asian="DejaVuSans" style:font-size-asian="7.09999990463257pt" style:font-weight-asian="normal" style:font-name-complex="DejaVuSans" style:font-size-complex="7.09999990463257pt" style:font-weight-complex="normal"/>
    </style:style>
    <style:style style:name="T18" style:family="text">
      <style:text-properties fo:color="#bbbbbb" loext:opacity="100%" style:font-name="DejaVuSans" fo:font-size="7.09999990463257pt" fo:font-weight="normal" style:font-name-asian="DejaVuSans" style:font-size-asian="7.09999990463257pt" style:font-weight-asian="normal" style:font-name-complex="DejaVuSans" style:font-size-complex="7.0999999046325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3.812cm" svg:height="20.637cm" svg:x="0cm" svg:y="0cm" svg:viewBox="0 0 23813 20638" draw:points="0,0 23813,0 23813,20638 0,20638">
          <text:p/>
        </draw:polygon>
        <draw:frame draw:style-name="gr2" draw:text-style-name="P3" draw:layer="layout" svg:width="13.878cm" svg:height="0.522cm" svg:x="4.939cm" svg:y="0.535cm">
          <draw:text-box>
            <text:p text:style-name="P2"><text:span text:style-name="T1">Evolvée Radiance Operations Hub — System Data Flow</text:span></text:p>
          </draw:text-box>
        </draw:frame>
        <draw:line draw:style-name="gr3" draw:text-style-name="P4" draw:layer="layout" svg:x1="1.058cm" svg:y1="1.693cm" svg:x2="22.754cm" svg:y2="1.693cm">
          <text:p/>
        </draw:line>
        <draw:path draw:style-name="gr4" draw:text-style-name="P5" draw:layer="layout" svg:width="5.864cm" svg:height="3.334cm" svg:x="0.635cm" svg:y="1.957cm" svg:viewBox="0 0 5865 3335" svg:d="M220 0h5425c122 0 220 88 220 159v3017c0 88-98 159-220 159h-5425c-120 0-220-87-220-159v-3017c0-87 100-159 220-159z">
          <text:p/>
        </draw:path>
        <draw:frame draw:style-name="gr5" draw:text-style-name="P6" draw:layer="layout" svg:width="9.532cm" svg:height="0.34cm" svg:x="7.164cm" svg:y="1.159cm">
          <draw:text-box>
            <text:p text:style-name="P2"><text:span text:style-name="T2">V1 Architecture · React / Express / PostgreSQL · Six External APIs</text:span></text:p>
          </draw:text-box>
        </draw:frame>
        <draw:path draw:style-name="gr6" draw:text-style-name="P7" draw:layer="layout" svg:width="0.265cm" svg:height="0.265cm" svg:x="0.952cm" svg:y="2.698cm" svg:viewBox="0 0 266 266" svg:d="M53 0h159c30 0 54 29 54 53v160c0 29-24 53-54 53h-159c-29 0-53-29-53-53v-160c0-29 24-53 53-53z">
          <text:p/>
        </draw:path>
        <draw:frame draw:style-name="gr7" draw:text-style-name="P8" draw:layer="layout" svg:width="5.261cm" svg:height="0.327cm" svg:x="0.953cm" svg:y="2.229cm">
          <draw:text-box>
            <text:p text:style-name="P2"><text:span text:style-name="T3">Legend — V1 Dashboard Modules</text:span></text:p>
          </draw:text-box>
        </draw:frame>
        <draw:path draw:style-name="gr8" draw:text-style-name="P9" draw:layer="layout" svg:width="0.265cm" svg:height="0.264cm" svg:x="0.952cm" svg:y="3.122cm" svg:viewBox="0 0 266 265" svg:d="M53 0h159c30 0 54 29 54 52v160c0 29-24 53-54 53h-159c-29 0-53-29-53-53v-160c0-29 24-52 53-52z">
          <text:p/>
        </draw:path>
        <draw:frame draw:style-name="gr9" draw:text-style-name="P10" draw:layer="layout" svg:width="2.796cm" svg:height="0.311cm" svg:x="1.376cm" svg:y="2.691cm">
          <draw:text-box>
            <text:p text:style-name="P2"><text:span text:style-name="T4">Core Application Tier</text:span></text:p>
          </draw:text-box>
        </draw:frame>
        <draw:path draw:style-name="gr10" draw:text-style-name="P11" draw:layer="layout" svg:width="0.265cm" svg:height="0.264cm" svg:x="0.952cm" svg:y="3.545cm" svg:viewBox="0 0 266 265" svg:d="M53 0h159c30 0 54 30 54 54v159c0 29-24 52-54 52h-159c-29 0-53-29-53-52v-159c0-29 24-54 53-54z">
          <text:p/>
        </draw:path>
        <draw:frame draw:style-name="gr9" draw:text-style-name="P10" draw:layer="layout" svg:width="2.865cm" svg:height="0.311cm" svg:x="1.376cm" svg:y="3.115cm">
          <draw:text-box>
            <text:p text:style-name="P2"><text:span text:style-name="T4">External API / Service</text:span></text:p>
          </draw:text-box>
        </draw:frame>
        <draw:path draw:style-name="gr11" draw:text-style-name="P1" draw:layer="layout" svg:width="0.265cm" svg:height="0.265cm" svg:x="0.952cm" svg:y="3.968cm" svg:viewBox="0 0 266 266" svg:d="M53 0h159c30 0 54 29 54 53v160c0 29-24 53-54 53h-159c-29 0-53-29-53-53v-160c0-29 24-53 53-53z">
          <text:p/>
        </draw:path>
        <draw:frame draw:style-name="gr9" draw:text-style-name="P10" draw:layer="layout" svg:width="2.032cm" svg:height="0.311cm" svg:x="1.376cm" svg:y="3.538cm">
          <draw:text-box>
            <text:p text:style-name="P2"><text:span text:style-name="T4">Scheduled Jobs</text:span></text:p>
          </draw:text-box>
        </draw:frame>
        <draw:frame draw:style-name="gr9" draw:text-style-name="P10" draw:layer="layout" svg:width="1.869cm" svg:height="0.311cm" svg:x="1.376cm" svg:y="3.961cm">
          <draw:text-box>
            <text:p text:style-name="P2"><text:span text:style-name="T4">Pending / TBC</text:span></text:p>
          </draw:text-box>
        </draw:frame>
        <draw:frame draw:style-name="gr12" draw:text-style-name="P12" draw:layer="layout" svg:width="4.964cm" svg:height="0.297cm" svg:x="0.953cm" svg:y="4.397cm">
          <draw:text-box>
            <text:p text:style-name="P2"><text:span text:style-name="T5">Modules: Inventory · Sales · Customers</text:span></text:p>
          </draw:text-box>
        </draw:frame>
        <draw:path draw:style-name="gr13" draw:text-style-name="P7" draw:layer="layout" svg:width="5.821cm" svg:height="1.217cm" svg:x="8.731cm" svg:y="2.116cm" svg:viewBox="0 0 5822 1218" svg:d="M238 0h5344c132 0 240 132 240 238v742c0 132-108 238-240 238h-5344c-132 0-238-131-238-238v-742c0-131 106-238 238-238z">
          <text:p/>
        </draw:path>
        <draw:frame draw:style-name="gr12" draw:text-style-name="P12" draw:layer="layout" svg:width="4.544cm" svg:height="0.297cm" svg:x="0.953cm" svg:y="4.741cm">
          <draw:text-box>
            <text:p text:style-name="P2"><text:span text:style-name="T5">Revenue · Shipping · Reorder Alerts</text:span></text:p>
          </draw:text-box>
        </draw:frame>
        <draw:frame draw:style-name="gr14" draw:text-style-name="P13" draw:layer="layout" svg:width="3.133cm" svg:height="0.42cm" svg:x="10.086cm" svg:y="2.288cm">
          <draw:text-box>
            <text:p text:style-name="P2"><text:span text:style-name="T6">React Frontend</text:span></text:p>
          </draw:text-box>
        </draw:frame>
        <draw:line draw:style-name="gr15" draw:text-style-name="P4" draw:layer="layout" svg:x1="11.641cm" svg:y1="3.333cm" svg:x2="11.641cm" svg:y2="6.244cm">
          <text:p/>
        </draw:line>
        <draw:polyline draw:style-name="gr16" draw:text-style-name="P4" draw:layer="layout" svg:width="0.228cm" svg:height="0.172cm" svg:x="11.527cm" svg:y="3.333cm" svg:viewBox="0 0 229 173" draw:points="0,173 114,0 229,173">
          <text:p/>
        </draw:polyline>
        <draw:polyline draw:style-name="gr16" draw:text-style-name="P4" draw:layer="layout" svg:width="0.228cm" svg:height="0.172cm" svg:x="11.527cm" svg:y="6.072cm" svg:viewBox="0 0 229 173" draw:points="229,0 114,173 0,0">
          <text:p/>
        </draw:polyline>
        <draw:path draw:style-name="gr17" draw:text-style-name="P14" draw:layer="layout" svg:width="1.906cm" svg:height="0.476cm" svg:x="11.906cm" svg:y="4.445cm" svg:viewBox="0 0 1907 477" svg:d="M106 0h1694c58 0 107 58 107 106v265c0 58-49 106-107 106h-1694c-59 0-106-59-106-106v-265c0-59 47-106 106-106z">
          <text:p/>
        </draw:path>
        <draw:frame draw:style-name="gr9" draw:text-style-name="P10" draw:layer="layout" svg:width="2.702cm" svg:height="0.311cm" svg:x="10.301cm" svg:y="2.824cm">
          <draw:text-box>
            <text:p text:style-name="P2"><text:span text:style-name="T7">Netlify · JWT session</text:span></text:p>
          </draw:text-box>
        </draw:frame>
        <draw:path draw:style-name="gr13" draw:text-style-name="P7" draw:layer="layout" svg:width="5.821cm" svg:height="1.217cm" svg:x="8.731cm" svg:y="6.244cm" svg:viewBox="0 0 5822 1218" svg:d="M238 0h5344c132 0 240 131 240 238v742c0 131-108 238-240 238h-5344c-132 0-238-132-238-238v-742c0-132 106-238 238-238z">
          <text:p/>
        </draw:path>
        <draw:frame draw:style-name="gr12" draw:text-style-name="P12" draw:layer="layout" svg:width="1.557cm" svg:height="0.297cm" svg:x="12.077cm" svg:y="4.556cm">
          <draw:text-box>
            <text:p text:style-name="P2"><text:span text:style-name="T8">HTTP / REST</text:span></text:p>
          </draw:text-box>
        </draw:frame>
        <draw:frame draw:style-name="gr14" draw:text-style-name="P13" draw:layer="layout" svg:width="3.44cm" svg:height="0.42cm" svg:x="9.934cm" svg:y="6.415cm">
          <draw:text-box>
            <text:p text:style-name="P2"><text:span text:style-name="T6">Express Backend</text:span></text:p>
          </draw:text-box>
        </draw:frame>
        <draw:line draw:style-name="gr15" draw:text-style-name="P4" draw:layer="layout" svg:x1="11.641cm" svg:y1="7.461cm" svg:x2="11.641cm" svg:y2="10.159cm">
          <text:p/>
        </draw:line>
        <draw:polyline draw:style-name="gr16" draw:text-style-name="P4" draw:layer="layout" svg:width="0.228cm" svg:height="0.171cm" svg:x="11.527cm" svg:y="7.461cm" svg:viewBox="0 0 229 172" draw:points="0,172 114,0 229,172">
          <text:p/>
        </draw:polyline>
        <draw:polyline draw:style-name="gr16" draw:text-style-name="P4" draw:layer="layout" svg:width="0.228cm" svg:height="0.171cm" svg:x="11.527cm" svg:y="9.988cm" svg:viewBox="0 0 229 172" draw:points="229,0 114,172 0,0">
          <text:p/>
        </draw:polyline>
        <draw:path draw:style-name="gr17" draw:text-style-name="P14" draw:layer="layout" svg:width="1.906cm" svg:height="0.476cm" svg:x="11.906cm" svg:y="8.519cm" svg:viewBox="0 0 1907 477" svg:d="M106 0h1694c58 0 107 59 107 106v266c0 58-49 105-107 105h-1694c-59 0-106-58-106-105v-266c0-59 47-106 106-106z">
          <text:p/>
        </draw:path>
        <draw:frame draw:style-name="gr9" draw:text-style-name="P10" draw:layer="layout" svg:width="4.093cm" svg:height="0.311cm" svg:x="9.61cm" svg:y="6.951cm">
          <draw:text-box>
            <text:p text:style-name="P2"><text:span text:style-name="T7">Railway · JWT auth · node-cron</text:span></text:p>
          </draw:text-box>
        </draw:frame>
        <draw:path draw:style-name="gr13" draw:text-style-name="P7" draw:layer="layout" svg:width="5.821cm" svg:height="1.218cm" svg:x="8.731cm" svg:y="10.16cm" svg:viewBox="0 0 5822 1219" svg:d="M238 0h5344c132 0 240 132 240 240v740c0 132-108 239-240 239h-5344c-132 0-238-132-238-239v-740c0-133 106-240 238-240z">
          <text:p/>
        </draw:path>
        <draw:frame draw:style-name="gr12" draw:text-style-name="P12" draw:layer="layout" svg:width="1.465cm" svg:height="0.297cm" svg:x="12.13cm" svg:y="8.63cm">
          <draw:text-box>
            <text:p text:style-name="P2"><text:span text:style-name="T8">read / write</text:span></text:p>
          </draw:text-box>
        </draw:frame>
        <draw:frame draw:style-name="gr14" draw:text-style-name="P13" draw:layer="layout" svg:width="2.373cm" svg:height="0.42cm" svg:x="10.454cm" svg:y="10.331cm">
          <draw:text-box>
            <text:p text:style-name="P2"><text:span text:style-name="T6">PostgreSQL</text:span></text:p>
          </draw:text-box>
        </draw:frame>
        <draw:path draw:style-name="gr18" draw:text-style-name="P9" draw:layer="layout" svg:width="5.556cm" svg:height="1.376cm" svg:x="16.933cm" svg:y="2.116cm" svg:viewBox="0 0 5557 1377" svg:d="M212 0h5133c117 0 212 117 212 212v952c0 117-95 213-212 213h-5133c-117 0-212-118-212-213v-952c0-117 95-212 212-212z">
          <text:p/>
        </draw:path>
        <draw:frame draw:style-name="gr9" draw:text-style-name="P10" draw:layer="layout" svg:width="3.826cm" svg:height="0.311cm" svg:x="9.741cm" svg:y="10.867cm">
          <draw:text-box>
            <text:p text:style-name="P2"><text:span text:style-name="T7">Railway · operations_hub DB</text:span></text:p>
          </draw:text-box>
        </draw:frame>
        <draw:frame draw:style-name="gr19" draw:text-style-name="P15" draw:layer="layout" svg:width="1.41cm" svg:height="0.382cm" svg:x="18.997cm" svg:y="2.365cm">
          <draw:text-box>
            <text:p text:style-name="P2"><text:span text:style-name="T9">Shopify</text:span></text:p>
          </draw:text-box>
        </draw:frame>
        <draw:frame draw:style-name="gr12" draw:text-style-name="P12" draw:layer="layout" svg:width="5.273cm" svg:height="0.297cm" svg:x="17.1cm" svg:y="2.862cm">
          <draw:text-box>
            <text:p text:style-name="P2"><text:span text:style-name="T10">Orders · Products · Customers · Inventory</text:span></text:p>
          </draw:text-box>
        </draw:frame>
        <draw:line draw:style-name="gr20" draw:text-style-name="P4" draw:layer="layout" svg:x1="16.934cm" svg:y1="2.804cm" svg:x2="14.552cm" svg:y2="6.853cm">
          <text:p/>
        </draw:line>
        <draw:polyline draw:style-name="gr21" draw:text-style-name="P4" draw:layer="layout" svg:width="0.153cm" svg:height="0.15cm" svg:x="14.543cm" svg:y="6.702cm" svg:viewBox="0 0 154 151" draw:points="154,81 9,151 0,0">
          <text:p/>
        </draw:polyline>
        <draw:path draw:style-name="gr18" draw:text-style-name="P9" draw:layer="layout" svg:width="5.556cm" svg:height="1.376cm" svg:x="16.933cm" svg:y="4.021cm" svg:viewBox="0 0 5557 1377" svg:d="M212 0h5133c117 0 212 117 212 212v953c0 117-95 212-212 212h-5133c-117 0-212-117-212-212v-953c0-117 95-212 212-212z">
          <text:p/>
        </draw:path>
        <draw:frame draw:style-name="gr22" draw:text-style-name="P16" draw:layer="layout" svg:width="4.516cm" svg:height="0.276cm" svg:x="17.444cm" svg:y="3.192cm">
          <draw:text-box>
            <text:p text:style-name="P2"><text:span text:style-name="T11">REST Admin API (legacy) · on-demand</text:span></text:p>
          </draw:text-box>
        </draw:frame>
        <draw:frame draw:style-name="gr19" draw:text-style-name="P15" draw:layer="layout" svg:width="2.84cm" svg:height="0.382cm" svg:x="18.286cm" svg:y="4.27cm">
          <draw:text-box>
            <text:p text:style-name="P2"><text:span text:style-name="T9">Zoho Inventory</text:span></text:p>
          </draw:text-box>
        </draw:frame>
        <draw:frame draw:style-name="gr12" draw:text-style-name="P12" draw:layer="layout" svg:width="4.194cm" svg:height="0.297cm" svg:x="17.635cm" svg:y="4.767cm">
          <draw:text-box>
            <text:p text:style-name="P2"><text:span text:style-name="T10">Stock levels · Reorder thresholds</text:span></text:p>
          </draw:text-box>
        </draw:frame>
        <draw:line draw:style-name="gr20" draw:text-style-name="P4" draw:layer="layout" svg:x1="16.934cm" svg:y1="4.709cm" svg:x2="14.552cm" svg:y2="6.959cm">
          <text:p/>
        </draw:line>
        <draw:polyline draw:style-name="gr21" draw:text-style-name="P4" draw:layer="layout" svg:width="0.158cm" svg:height="0.15cm" svg:x="14.552cm" svg:y="6.808cm" svg:viewBox="0 0 159 151" draw:points="159,124 0,151 34,0">
          <text:p/>
        </draw:polyline>
        <draw:path draw:style-name="gr18" draw:text-style-name="P9" draw:layer="layout" svg:width="5.556cm" svg:height="1.376cm" svg:x="16.933cm" svg:y="5.926cm" svg:viewBox="0 0 5557 1377" svg:d="M212 0h5133c117 0 212 117 212 212v953c0 117-95 212-212 212h-5133c-117 0-212-117-212-212v-953c0-117 95-212 212-212z">
          <text:p/>
        </draw:path>
        <draw:frame draw:style-name="gr22" draw:text-style-name="P16" draw:layer="layout" svg:width="2.984cm" svg:height="0.276cm" svg:x="18.212cm" svg:y="5.097cm">
          <draw:text-box>
            <text:p text:style-name="P2"><text:span text:style-name="T11">Hourly poll via node-cron</text:span></text:p>
          </draw:text-box>
        </draw:frame>
        <draw:frame draw:style-name="gr19" draw:text-style-name="P15" draw:layer="layout" svg:width="2.167cm" svg:height="0.382cm" svg:x="18.628cm" svg:y="6.175cm">
          <draw:text-box>
            <text:p text:style-name="P2"><text:span text:style-name="T9">Zoho Books</text:span></text:p>
          </draw:text-box>
        </draw:frame>
        <draw:frame draw:style-name="gr12" draw:text-style-name="P12" draw:layer="layout" svg:width="2.572cm" svg:height="0.297cm" svg:x="18.434cm" svg:y="6.672cm">
          <draw:text-box>
            <text:p text:style-name="P2"><text:span text:style-name="T10">Revenue · Expenses</text:span></text:p>
          </draw:text-box>
        </draw:frame>
        <draw:line draw:style-name="gr20" draw:text-style-name="P4" draw:layer="layout" svg:x1="16.934cm" svg:y1="6.614cm" svg:x2="14.552cm" svg:y2="6.959cm">
          <text:p/>
        </draw:line>
        <draw:polyline draw:style-name="gr21" draw:text-style-name="P4" draw:layer="layout" svg:width="0.144cm" svg:height="0.176cm" svg:x="14.552cm" svg:y="6.851cm" svg:viewBox="0 0 145 177" draw:points="145,177 0,108 120,0">
          <text:p/>
        </draw:polyline>
        <draw:path draw:style-name="gr18" draw:text-style-name="P9" draw:layer="layout" svg:width="5.556cm" svg:height="1.376cm" svg:x="16.933cm" svg:y="7.831cm" svg:viewBox="0 0 5557 1377" svg:d="M212 0h5133c117 0 212 117 212 212v953c0 117-95 212-212 212h-5133c-117 0-212-117-212-212v-953c0-117 95-212 212-212z">
          <text:p/>
        </draw:path>
        <draw:frame draw:style-name="gr22" draw:text-style-name="P16" draw:layer="layout" svg:width="1.222cm" svg:height="0.276cm" svg:x="19.095cm" svg:y="7.002cm">
          <draw:text-box>
            <text:p text:style-name="P2"><text:span text:style-name="T11">Daily sync</text:span></text:p>
          </draw:text-box>
        </draw:frame>
        <draw:frame draw:style-name="gr19" draw:text-style-name="P15" draw:layer="layout" svg:width="1.87cm" svg:height="0.382cm" svg:x="18.784cm" svg:y="8.08cm">
          <draw:text-box>
            <text:p text:style-name="P2"><text:span text:style-name="T9">Zoho CRM</text:span></text:p>
          </draw:text-box>
        </draw:frame>
        <draw:frame draw:style-name="gr12" draw:text-style-name="P12" draw:layer="layout" svg:width="3.579cm" svg:height="0.297cm" svg:x="17.941cm" svg:y="8.577cm">
          <draw:text-box>
            <text:p text:style-name="P2"><text:span text:style-name="T10">Customer records · Partners</text:span></text:p>
          </draw:text-box>
        </draw:frame>
        <draw:line draw:style-name="gr20" draw:text-style-name="P4" draw:layer="layout" svg:x1="16.934cm" svg:y1="8.52cm" svg:x2="14.552cm" svg:y2="6.958cm">
          <text:p/>
        </draw:line>
        <draw:polyline draw:style-name="gr21" draw:text-style-name="P4" draw:layer="layout" svg:width="0.158cm" svg:height="0.148cm" svg:x="14.552cm" svg:y="6.957cm" svg:viewBox="0 0 159 149" draw:points="62,149 0,1 159,0">
          <text:p/>
        </draw:polyline>
        <draw:path draw:style-name="gr18" draw:text-style-name="P9" draw:layer="layout" svg:width="5.556cm" svg:height="1.376cm" svg:x="16.933cm" svg:y="9.736cm" svg:viewBox="0 0 5557 1377" svg:d="M212 0h5133c117 0 212 117 212 212v953c0 117-95 212-212 212h-5133c-117 0-212-117-212-212v-953c0-117 95-212 212-212z">
          <text:p/>
        </draw:path>
        <draw:frame draw:style-name="gr22" draw:text-style-name="P16" draw:layer="layout" svg:width="1.398cm" svg:height="0.276cm" svg:x="19.015cm" svg:y="8.907cm">
          <draw:text-box>
            <text:p text:style-name="P2"><text:span text:style-name="T11">On-demand</text:span></text:p>
          </draw:text-box>
        </draw:frame>
        <draw:frame draw:style-name="gr19" draw:text-style-name="P15" draw:layer="layout" svg:width="1.768cm" svg:height="0.382cm" svg:x="18.834cm" svg:y="9.985cm">
          <draw:text-box>
            <text:p text:style-name="P2"><text:span text:style-name="T9">AfterShip</text:span></text:p>
          </draw:text-box>
        </draw:frame>
        <draw:frame draw:style-name="gr12" draw:text-style-name="P12" draw:layer="layout" svg:width="3.37cm" svg:height="0.297cm" svg:x="18.043cm" svg:y="10.482cm">
          <draw:text-box>
            <text:p text:style-name="P2"><text:span text:style-name="T10">Shipping &amp; tracking status</text:span></text:p>
          </draw:text-box>
        </draw:frame>
        <draw:line draw:style-name="gr23" draw:text-style-name="P4" draw:layer="layout" svg:x1="16.934cm" svg:y1="10.425cm" svg:x2="14.552cm" svg:y2="6.958cm">
          <text:p/>
        </draw:line>
        <draw:polyline draw:style-name="gr24" draw:text-style-name="P4" draw:layer="layout" svg:width="0.148cm" svg:height="0.16cm" svg:x="14.552cm" svg:y="6.958cm" svg:viewBox="0 0 149 161" draw:points="2,161 0,0 149,61">
          <text:p/>
        </draw:polyline>
        <draw:path draw:style-name="gr18" draw:text-style-name="P9" draw:layer="layout" svg:width="5.556cm" svg:height="1.376cm" svg:x="16.933cm" svg:y="11.641cm" svg:viewBox="0 0 5557 1377" svg:d="M212 0h5133c117 0 212 118 212 213v952c0 117-95 212-212 212h-5133c-117 0-212-117-212-212v-952c0-117 95-213 212-213z">
          <text:p/>
        </draw:path>
        <draw:frame draw:style-name="gr22" draw:text-style-name="P16" draw:layer="layout" svg:width="3.12cm" svg:height="0.276cm" svg:x="18.153cm" svg:y="10.812cm">
          <draw:text-box>
            <text:p text:style-name="P2"><text:span text:style-name="T11">Webhook push → backend</text:span></text:p>
          </draw:text-box>
        </draw:frame>
        <draw:frame draw:style-name="gr19" draw:text-style-name="P15" draw:layer="layout" svg:width="1.364cm" svg:height="0.382cm" svg:x="19.021cm" svg:y="11.89cm">
          <draw:text-box>
            <text:p text:style-name="P2"><text:span text:style-name="T9">Klaviyo</text:span></text:p>
          </draw:text-box>
        </draw:frame>
        <draw:frame draw:style-name="gr12" draw:text-style-name="P12" draw:layer="layout" svg:width="2.961cm" svg:height="0.297cm" svg:x="18.241cm" svg:y="12.387cm">
          <draw:text-box>
            <text:p text:style-name="P2"><text:span text:style-name="T10">Email / SMS campaigns</text:span></text:p>
          </draw:text-box>
        </draw:frame>
        <draw:line draw:style-name="gr23" draw:text-style-name="P4" draw:layer="layout" svg:x1="14.552cm" svg:y1="6.958cm" svg:x2="16.934cm" svg:y2="12.33cm">
          <text:p/>
        </draw:line>
        <draw:polyline draw:style-name="gr24" draw:text-style-name="P4" draw:layer="layout" svg:width="0.162cm" svg:height="0.158cm" svg:x="16.798cm" svg:y="12.171cm" svg:viewBox="0 0 163 159" draw:points="163,0 136,159 0,72">
          <text:p/>
        </draw:polyline>
        <draw:path draw:style-name="gr25" draw:text-style-name="P17" draw:layer="layout" svg:width="22.12cm" svg:height="2.381cm" svg:x="0.635cm" svg:y="14.816cm" svg:viewBox="0 0 22121 2382" svg:d="M212 0h21697c117 0 212 117 212 212v1959c0 117-95 211-212 211h-21697c-117 0-212-116-212-211v-1959c0-117 95-212 212-212z">
          <text:p/>
        </draw:path>
        <draw:frame draw:style-name="gr22" draw:text-style-name="P16" draw:layer="layout" svg:width="4.233cm" svg:height="0.276cm" svg:x="17.59cm" svg:y="12.717cm">
          <draw:text-box>
            <text:p text:style-name="P2"><text:span text:style-name="T11">Outbound only (backend → Klaviyo)</text:span></text:p>
          </draw:text-box>
        </draw:frame>
        <draw:path draw:style-name="gr26" draw:text-style-name="P11" draw:layer="layout" svg:width="2.91cm" svg:height="0.899cm" svg:x="1.164cm" svg:y="15.716cm" svg:viewBox="0 0 2911 900" svg:d="M158 0h2594c88 0 159 88 159 159v583c0 87-71 158-159 158h-2594c-87 0-158-87-158-158v-583c0-87 71-159 158-159z">
          <text:p/>
        </draw:path>
        <draw:frame draw:style-name="gr5" draw:text-style-name="P6" draw:layer="layout" svg:width="5.971cm" svg:height="0.34cm" svg:x="1.058cm" svg:y="15.129cm">
          <draw:text-box>
            <text:p text:style-name="P2"><text:span text:style-name="T12">Scheduled Jobs Pipeline (node-cron)</text:span></text:p>
          </draw:text-box>
        </draw:frame>
        <draw:frame draw:style-name="gr7" draw:text-style-name="P8" draw:layer="layout" svg:width="1.593cm" svg:height="0.327cm" svg:x="1.828cm" svg:y="15.961cm">
          <draw:text-box>
            <text:p text:style-name="P2"><text:span text:style-name="T13">node-cron</text:span></text:p>
          </draw:text-box>
        </draw:frame>
        <draw:line draw:style-name="gr27" draw:text-style-name="P4" draw:layer="layout" svg:x1="4.074cm" svg:y1="16.166cm" svg:x2="5.132cm" svg:y2="16.166cm">
          <text:p/>
        </draw:line>
        <draw:polyline draw:style-name="gr28" draw:text-style-name="P4" draw:layer="layout" svg:width="0.133cm" svg:height="0.177cm" svg:x="4.999cm" svg:y="16.077cm" svg:viewBox="0 0 134 178" draw:points="0,0 134,89 0,178">
          <text:p/>
        </draw:polyline>
        <draw:path draw:style-name="gr26" draw:text-style-name="P11" draw:layer="layout" svg:width="3.44cm" svg:height="0.899cm" svg:x="5.132cm" svg:y="15.716cm" svg:viewBox="0 0 3441 900" svg:d="M160 0h3122c88 0 159 88 159 159v583c0 87-71 158-159 158h-3122c-87 0-160-87-160-158v-583c0-87 73-159 160-159z">
          <text:p/>
        </draw:path>
        <draw:frame draw:style-name="gr22" draw:text-style-name="P16" draw:layer="layout" svg:width="1.627cm" svg:height="0.276cm" svg:x="1.792cm" svg:y="16.315cm">
          <draw:text-box>
            <text:p text:style-name="P2"><text:span text:style-name="T14">hourly trigger</text:span></text:p>
          </draw:text-box>
        </draw:frame>
        <draw:frame draw:style-name="gr7" draw:text-style-name="P8" draw:layer="layout" svg:width="2.404cm" svg:height="0.327cm" svg:x="5.655cm" svg:y="15.961cm">
          <draw:text-box>
            <text:p text:style-name="P2"><text:span text:style-name="T13">Zoho Inventory</text:span></text:p>
          </draw:text-box>
        </draw:frame>
        <draw:line draw:style-name="gr27" draw:text-style-name="P4" draw:layer="layout" svg:x1="8.572cm" svg:y1="16.166cm" svg:x2="9.63cm" svg:y2="16.166cm">
          <text:p/>
        </draw:line>
        <draw:polyline draw:style-name="gr28" draw:text-style-name="P4" draw:layer="layout" svg:width="0.133cm" svg:height="0.177cm" svg:x="9.497cm" svg:y="16.077cm" svg:viewBox="0 0 134 178" draw:points="0,0 134,89 0,178">
          <text:p/>
        </draw:polyline>
        <draw:path draw:style-name="gr26" draw:text-style-name="P11" draw:layer="layout" svg:width="3.704cm" svg:height="0.899cm" svg:x="9.63cm" svg:y="15.716cm" svg:viewBox="0 0 3705 900" svg:d="M159 0h3388c87 0 158 88 158 159v583c0 87-71 158-158 158h-3388c-88 0-159-87-159-158v-583c0-87 71-159 159-159z">
          <text:p/>
        </draw:path>
        <draw:frame draw:style-name="gr22" draw:text-style-name="P16" draw:layer="layout" svg:width="2.072cm" svg:height="0.276cm" svg:x="5.816cm" svg:y="16.315cm">
          <draw:text-box>
            <text:p text:style-name="P2"><text:span text:style-name="T14">fetch stock levels</text:span></text:p>
          </draw:text-box>
        </draw:frame>
        <draw:frame draw:style-name="gr7" draw:text-style-name="P8" draw:layer="layout" svg:width="3.073cm" svg:height="0.327cm" svg:x="9.962cm" svg:y="15.961cm">
          <draw:text-box>
            <text:p text:style-name="P2"><text:span text:style-name="T13">Threshold Compare</text:span></text:p>
          </draw:text-box>
        </draw:frame>
        <draw:line draw:style-name="gr27" draw:text-style-name="P4" draw:layer="layout" svg:x1="13.335cm" svg:y1="16.166cm" svg:x2="14.394cm" svg:y2="16.166cm">
          <text:p/>
        </draw:line>
        <draw:polyline draw:style-name="gr28" draw:text-style-name="P4" draw:layer="layout" svg:width="0.134cm" svg:height="0.177cm" svg:x="14.259cm" svg:y="16.077cm" svg:viewBox="0 0 135 178" draw:points="0,0 135,89 0,178">
          <text:p/>
        </draw:polyline>
        <draw:path draw:style-name="gr26" draw:text-style-name="P11" draw:layer="layout" svg:width="3.176cm" svg:height="0.899cm" svg:x="14.393cm" svg:y="15.716cm" svg:viewBox="0 0 3177 900" svg:d="M159 0h2859c88 0 159 88 159 159v583c0 87-71 158-159 158h-2859c-88 0-159-87-159-158v-583c0-87 71-159 159-159z">
          <text:p/>
        </draw:path>
        <draw:frame draw:style-name="gr22" draw:text-style-name="P16" draw:layer="layout" svg:width="3.1cm" svg:height="0.276cm" svg:x="9.931cm" svg:y="16.315cm">
          <draw:text-box>
            <text:p text:style-name="P2"><text:span text:style-name="T14">stock ≤ reorder_threshold</text:span></text:p>
          </draw:text-box>
        </draw:frame>
        <draw:frame draw:style-name="gr7" draw:text-style-name="P8" draw:layer="layout" svg:width="2.61cm" svg:height="0.327cm" svg:x="14.69cm" svg:y="15.961cm">
          <draw:text-box>
            <text:p text:style-name="P2"><text:span text:style-name="T13">Write Alert → DB</text:span></text:p>
          </draw:text-box>
        </draw:frame>
        <draw:line draw:style-name="gr27" draw:text-style-name="P4" draw:layer="layout" svg:x1="17.568cm" svg:y1="16.166cm" svg:x2="18.626cm" svg:y2="16.166cm">
          <text:p/>
        </draw:line>
        <draw:polyline draw:style-name="gr28" draw:text-style-name="P4" draw:layer="layout" svg:width="0.133cm" svg:height="0.177cm" svg:x="18.493cm" svg:y="16.077cm" svg:viewBox="0 0 134 178" draw:points="0,0 134,89 0,178">
          <text:p/>
        </draw:polyline>
        <draw:path draw:style-name="gr26" draw:text-style-name="P11" draw:layer="layout" svg:width="3.44cm" svg:height="0.899cm" svg:x="18.626cm" svg:y="15.716cm" svg:viewBox="0 0 3441 900" svg:d="M159 0h3123c88 0 159 88 159 159v583c0 87-71 158-159 158h-3123c-88 0-159-87-159-158v-583c0-87 71-159 159-159z">
          <text:p/>
        </draw:path>
        <draw:frame draw:style-name="gr22" draw:text-style-name="P16" draw:layer="layout" svg:width="2.347cm" svg:height="0.276cm" svg:x="14.799cm" svg:y="16.315cm">
          <draw:text-box>
            <text:p text:style-name="P2"><text:span text:style-name="T14">reorder_alerts table</text:span></text:p>
          </draw:text-box>
        </draw:frame>
        <draw:frame draw:style-name="gr7" draw:text-style-name="P8" draw:layer="layout" svg:width="2.314cm" svg:height="0.327cm" svg:x="19.188cm" svg:y="15.961cm">
          <draw:text-box>
            <text:p text:style-name="P2"><text:span text:style-name="T13">Frontend Alert</text:span></text:p>
          </draw:text-box>
        </draw:frame>
        <draw:line draw:style-name="gr29" draw:text-style-name="P4" draw:layer="layout" svg:x1="11.641cm" svg:y1="11.377cm" svg:x2="11.641cm" svg:y2="14.816cm">
          <text:p/>
        </draw:line>
        <draw:polyline draw:style-name="gr30" draw:text-style-name="P4" draw:layer="layout" svg:width="0.152cm" svg:height="0.114cm" svg:x="11.565cm" svg:y="14.702cm" svg:viewBox="0 0 153 115" draw:points="153,0 77,115 0,0">
          <text:p/>
        </draw:polyline>
        <draw:path draw:style-name="gr31" draw:text-style-name="P18" draw:layer="layout" svg:width="7.938cm" svg:height="1.906cm" svg:x="0.635cm" svg:y="17.727cm" svg:viewBox="0 0 7939 1907" svg:d="M212 0h7515c117 0 212 116 212 211v1483c0 118-95 213-212 213h-7515c-117 0-212-118-212-213v-1483c0-117 95-211 212-211z">
          <text:p/>
        </draw:path>
        <draw:frame draw:style-name="gr22" draw:text-style-name="P16" draw:layer="layout" svg:width="2.158cm" svg:height="0.276cm" svg:x="19.258cm" svg:y="16.315cm">
          <draw:text-box>
            <text:p text:style-name="P2"><text:span text:style-name="T14">Reorder Alerts tile</text:span></text:p>
          </draw:text-box>
        </draw:frame>
        <draw:frame draw:style-name="gr32" draw:text-style-name="P19" draw:layer="layout" svg:width="4.027cm" svg:height="0.374cm" svg:x="2.597cm" svg:y="18.12cm">
          <draw:text-box>
            <text:p text:style-name="P2"><text:span text:style-name="T15">QR Partner Dashboard</text:span></text:p>
          </draw:text-box>
        </draw:frame>
        <draw:frame draw:style-name="gr9" draw:text-style-name="P10" draw:layer="layout" svg:width="5.32cm" svg:height="0.311cm" svg:x="1.977cm" svg:y="18.646cm">
          <draw:text-box>
            <text:p text:style-name="P2"><text:span text:style-name="T16">TBC — pending API access confirmation</text:span></text:p>
          </draw:text-box>
        </draw:frame>
        <draw:line draw:style-name="gr33" draw:text-style-name="P4" draw:layer="layout" svg:x1="1.058cm" svg:y1="20.055cm" svg:x2="22.754cm" svg:y2="20.055cm">
          <text:p/>
        </draw:line>
        <draw:frame draw:style-name="gr12" draw:text-style-name="P12" draw:layer="layout" svg:width="6.402cm" svg:height="0.297cm" svg:x="1.437cm" svg:y="19.081cm">
          <draw:text-box>
            <text:p text:style-name="P2"><text:span text:style-name="T17">Partner &amp; commission data · placeholder tile in V1</text:span></text:p>
          </draw:text-box>
        </draw:frame>
        <draw:frame draw:style-name="gr12" draw:text-style-name="P12" draw:layer="layout" svg:width="8.967cm" svg:height="0.297cm" svg:x="7.466cm" svg:y="20.193cm">
          <draw:text-box>
            <text:p text:style-name="P2"><text:span text:style-name="T18">Evolvée Radiance Operations Hub · System Data Flow · V1 · June 202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103" draw:style="rect" draw:dots1="1" draw:dots1-length="0.158cm" draw:distance="0.079cm"/>
    <draw:stroke-dash draw:name="stroke-dash50" draw:style="rect" draw:dots1="1" draw:dots1-length="0.079cm" draw:distance="0.052cm"/>
    <draw:stroke-dash draw:name="stroke-dash61" draw:style="rect" draw:dots1="1" draw:dots1-length="0.132cm" draw:distance="0.079cm"/>
    <draw:stroke-dash draw:name="stroke-dash76" draw:style="rect" draw:dots1="1" draw:dots1-length="0.111cm" draw:distance="0.066cm"/>
    <draw:stroke-dash draw:name="stroke-dash83" draw:style="rect" draw:dots1="1" draw:dots1-length="0.105cm" draw:distance="0.079cm"/>
    <draw:stroke-dash draw:name="stroke-dash88" draw:style="rect" draw:dots1="1" draw:dots1-length="0.076cm" draw:distance="0.0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3.812cm" fo:page-height="20.63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6-11T14:02:40.228135500</dc:date>
    <meta:editing-duration>PT11S</meta:editing-duration>
    <meta:editing-cycles>1</meta:editing-cycles>
    <meta:document-statistic meta:object-count="104"/>
    <meta:generator>LibreOffice/26.2.3.2$Windows_X86_64 LibreOffice_project/70e089b17412e4cb7773e41413306b17a2328c34</meta:generator>
  </office:meta>
</office:document-meta>
</file>